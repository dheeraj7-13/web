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1000001368DB76632.png"/>
  <manifest:file-entry manifest:media-type="image/png" manifest:full-path="Pictures/10000201000003A2000001290E524410.png"/>
  <manifest:file-entry manifest:media-type="image/png" manifest:full-path="Pictures/100000000000010A00000120EFFC3574.png"/>
  <manifest:file-entry manifest:media-type="image/png" manifest:full-path="Pictures/100000000000010A0000011BE87CFF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in" fo:margin-left="0.090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style:min-row-height="0.3125in" style:keep-together="true" fo:keep-together="auto"/>
    </style:style>
    <style:style style:name="Table1.A1" style:family="table-cell">
      <style:table-cell-properties fo:padding="0in" fo:border="0.0208in solid #000001"/>
    </style:style>
    <style:style style:name="Table1.2" style:family="table-row">
      <style:table-row-properties style:min-row-height="0.3118in" style:keep-together="true" fo:keep-together="auto"/>
    </style:style>
    <style:style style:name="Table1.B2" style:family="table-cell" style:data-style-name="N0">
      <style:table-cell-properties fo:padding="0in" fo:border="0.0208in solid #000001"/>
    </style:style>
    <style:style style:name="P1" style:family="paragraph" style:parent-style-name="Text_20_body">
      <style:text-properties style:font-name="Times New Roman" fo:font-size="10pt" style:font-size-asian="10pt"/>
    </style:style>
    <style:style style:name="P2" style:family="paragraph" style:parent-style-name="Text_20_body">
      <style:text-properties style:font-name="Arial1" fo:font-size="19.5pt" fo:font-weight="bold" style:font-size-asian="19.5pt" style:font-weight-asian="bold"/>
    </style:style>
    <style:style style:name="P3" style:family="paragraph" style:parent-style-name="Text_20_body">
      <style:text-properties style:font-name="Arial1" fo:font-size="10pt" fo:font-weight="bold" style:font-size-asian="10pt" style:font-weight-asian="bold"/>
    </style:style>
    <style:style style:name="P4" style:family="paragraph" style:parent-style-name="Text_20_body">
      <style:text-properties fo:font-size="13pt" style:font-size-asian="13pt"/>
    </style:style>
    <style:style style:name="P5" style:family="paragraph" style:parent-style-name="Text_20_body">
      <style:text-properties fo:font-size="10pt" style:font-size-asian="10pt"/>
    </style:style>
    <style:style style:name="P6" style:family="paragraph" style:parent-style-name="Text_20_body">
      <style:text-properties fo:font-size="12pt" style:font-size-asian="12pt"/>
    </style:style>
    <style:style style:name="P7" style:family="paragraph" style:parent-style-name="Text_20_body">
      <style:paragraph-properties fo:margin-top="0.0008in" fo:margin-bottom="0in"/>
    </style:style>
    <style:style style:name="P8" style:family="paragraph" style:parent-style-name="Text_20_body">
      <style:paragraph-properties fo:margin-top="0.0008in" fo:margin-bottom="0in"/>
      <style:text-properties style:font-name="Times New Roman" fo:font-size="9.5pt" style:font-size-asian="9.5pt"/>
    </style:style>
    <style:style style:name="P9" style:family="paragraph" style:parent-style-name="Text_20_body">
      <style:paragraph-properties fo:margin-top="0.0043in" fo:margin-bottom="0in"/>
      <style:text-properties style:font-name="Times New Roman"/>
    </style:style>
    <style:style style:name="P10" style:family="paragraph" style:parent-style-name="Text_20_body">
      <style:paragraph-properties fo:margin-top="0.0043in" fo:margin-bottom="0in"/>
      <style:text-properties fo:font-size="10pt" style:font-size-asian="10pt"/>
    </style:style>
    <style:style style:name="P11" style:family="paragraph" style:parent-style-name="Text_20_body">
      <style:paragraph-properties fo:margin-top="0.0043in" fo:margin-bottom="0in"/>
      <style:text-properties fo:font-size="14pt" style:font-size-asian="14pt"/>
    </style:style>
    <style:style style:name="P12" style:family="paragraph" style:parent-style-name="Text_20_body">
      <style:paragraph-properties fo:margin-top="0.0063in" fo:margin-bottom="0in"/>
      <style:text-properties style:font-name="Arial1" fo:font-size="15.5pt" fo:font-weight="bold" style:font-size-asian="15.5pt" style:font-weight-asian="bold"/>
    </style:style>
    <style:style style:name="P13" style:family="paragraph" style:parent-style-name="Text_20_body">
      <style:paragraph-properties fo:margin-top="0.0063in" fo:margin-bottom="0in"/>
      <style:text-properties fo:font-size="16pt" style:font-size-asian="16pt"/>
    </style:style>
    <style:style style:name="P14" style:family="paragraph" style:parent-style-name="Text_20_body">
      <style:paragraph-properties fo:margin-top="0.0063in" fo:margin-bottom="0in"/>
      <style:text-properties fo:font-size="10pt" style:font-size-asian="10pt"/>
    </style:style>
    <style:style style:name="P15" style:family="paragraph" style:parent-style-name="Text_20_body">
      <style:paragraph-properties fo:margin-top="0.0063in" fo:margin-bottom="0in"/>
      <style:text-properties fo:font-size="12.5pt" style:font-size-asian="12.5pt"/>
    </style:style>
    <style:style style:name="P16" style:family="paragraph" style:parent-style-name="Text_20_body">
      <style:paragraph-properties fo:margin-top="0.0016in" fo:margin-bottom="0in"/>
      <style:text-properties fo:font-size="15.5pt" style:font-size-asian="15.5pt"/>
    </style:style>
    <style:style style:name="P17" style:family="paragraph" style:parent-style-name="Text_20_body">
      <style:paragraph-properties fo:margin-left="0.0693in" fo:margin-right="0in" fo:text-indent="0in" style:auto-text-indent="false"/>
    </style:style>
    <style:style style:name="P18" style:family="paragraph" style:parent-style-name="Text_20_body">
      <style:paragraph-properties fo:margin-left="0.0693in" fo:margin-right="0in" fo:margin-top="0.0646in" fo:margin-bottom="0in" fo:text-indent="0in" style:auto-text-indent="false"/>
    </style:style>
    <style:style style:name="P19" style:family="paragraph" style:parent-style-name="Text_20_body">
      <style:paragraph-properties fo:margin-left="0.0693in" fo:margin-right="0in" fo:margin-top="0.0264in" fo:margin-bottom="0in" fo:text-indent="0in" style:auto-text-indent="false"/>
    </style:style>
    <style:style style:name="P20" style:family="paragraph" style:parent-style-name="Text_20_body">
      <style:paragraph-properties fo:margin-top="0.0071in" fo:margin-bottom="0in"/>
      <style:text-properties fo:font-size="14.5pt" style:font-size-asian="14.5pt"/>
    </style:style>
    <style:style style:name="P21" style:family="paragraph" style:parent-style-name="Text_20_body">
      <style:paragraph-properties fo:margin-top="0.0035in" fo:margin-bottom="0in"/>
      <style:text-properties style:font-name="Arial1" fo:font-size="14.5pt" fo:font-weight="bold" style:font-size-asian="14.5pt" style:font-weight-asian="bold"/>
    </style:style>
    <style:style style:name="P22" style:family="paragraph" style:parent-style-name="Text_20_body" style:master-page-name="Converted3">
      <style:paragraph-properties fo:margin-top="0.0035in" fo:margin-bottom="0in" style:page-number="auto"/>
      <style:text-properties fo:font-size="7pt" style:font-size-asian="7pt"/>
    </style:style>
    <style:style style:name="P23" style:family="paragraph" style:parent-style-name="Text_20_body">
      <style:paragraph-properties fo:margin-left="0.1543in" fo:margin-right="0in" fo:text-indent="0in" style:auto-text-indent="false"/>
    </style:style>
    <style:style style:name="P24" style:family="paragraph" style:parent-style-name="Text_20_body">
      <style:paragraph-properties fo:margin-left="0.1543in" fo:margin-right="0in" fo:margin-top="0.0264in" fo:margin-bottom="0in" fo:text-indent="0in" style:auto-text-indent="false"/>
    </style:style>
    <style:style style:name="P25" style:family="paragraph" style:parent-style-name="Text_20_body" style:master-page-name="Converted2">
      <style:paragraph-properties fo:margin-left="0.1543in" fo:margin-right="0in" fo:margin-top="0.0555in" fo:margin-bottom="0in" fo:text-indent="0in" style:auto-text-indent="false" style:page-number="auto"/>
    </style:style>
    <style:style style:name="P26" style:family="paragraph" style:parent-style-name="Text_20_body">
      <style:paragraph-properties fo:margin-top="0.0047in" fo:margin-bottom="0in"/>
      <style:text-properties fo:font-size="14pt" style:font-size-asian="14pt"/>
    </style:style>
    <style:style style:name="P27" style:family="paragraph" style:parent-style-name="Text_20_body">
      <style:paragraph-properties fo:margin-top="0.0047in" fo:margin-bottom="0in"/>
      <style:text-properties fo:font-size="13pt" style:font-size-asian="13pt"/>
    </style:style>
    <style:style style:name="P28" style:family="paragraph" style:parent-style-name="Text_20_body">
      <style:paragraph-properties fo:margin-top="0.0047in" fo:margin-bottom="0in"/>
      <style:text-properties style:font-name="Arial1" fo:font-size="14pt" fo:font-weight="bold" style:font-size-asian="14pt" style:font-weight-asian="bold"/>
    </style:style>
    <style:style style:name="P29" style:family="paragraph" style:parent-style-name="Text_20_body">
      <style:paragraph-properties fo:margin-left="0.1543in" fo:margin-right="5.4701in" fo:line-height="115%" fo:text-indent="-0.0854in" style:auto-text-indent="false"/>
    </style:style>
    <style:style style:name="P30" style:family="paragraph" style:parent-style-name="Text_20_body">
      <style:paragraph-properties fo:margin-left="0.239in" fo:margin-right="0in" fo:text-indent="0in" style:auto-text-indent="false"/>
    </style:style>
    <style:style style:name="P31" style:family="paragraph" style:parent-style-name="Text_20_body">
      <style:paragraph-properties fo:margin-left="0.239in" fo:margin-right="0in" fo:margin-top="0.0264in" fo:margin-bottom="0in" fo:text-indent="0in" style:auto-text-indent="false"/>
    </style:style>
    <style:style style:name="P32" style:family="paragraph" style:parent-style-name="Text_20_body">
      <style:paragraph-properties fo:margin-left="0.1543in" fo:margin-right="4.6181in" fo:margin-top="0.0264in" fo:margin-bottom="0in" fo:line-height="115%" fo:text-indent="0in" style:auto-text-indent="false"/>
    </style:style>
    <style:style style:name="P33" style:family="paragraph" style:parent-style-name="Text_20_body">
      <style:paragraph-properties fo:margin-left="0.1543in" fo:margin-right="5.0173in" fo:margin-top="0.0264in" fo:margin-bottom="0in" fo:line-height="115%" fo:text-indent="0in" style:auto-text-indent="false"/>
    </style:style>
    <style:style style:name="P34" style:family="paragraph" style:parent-style-name="Text_20_body">
      <style:paragraph-properties fo:margin-left="0.1543in" fo:margin-right="4.5091in" fo:line-height="115%" fo:text-indent="0in" style:auto-text-indent="false"/>
    </style:style>
    <style:style style:name="P35" style:family="paragraph" style:parent-style-name="Text_20_body">
      <style:paragraph-properties fo:margin-left="0.1543in" fo:margin-right="5.4953in" fo:margin-top="0.0646in" fo:margin-bottom="0in" fo:line-height="115%" fo:text-indent="-0.0854in" style:auto-text-indent="false"/>
    </style:style>
    <style:style style:name="P36" style:family="paragraph" style:parent-style-name="Text_20_body">
      <style:paragraph-properties fo:margin-left="0.1543in" fo:margin-right="4.5091in" fo:line-height="115%" fo:text-indent="-0.0854in" style:auto-text-indent="false"/>
    </style:style>
    <style:style style:name="P37" style:family="paragraph" style:parent-style-name="Text_20_body">
      <style:paragraph-properties fo:margin-left="0.1543in" fo:margin-right="5.6646in" fo:margin-top="0.0646in" fo:margin-bottom="0in" fo:line-height="115%" fo:text-indent="-0.0854in" style:auto-text-indent="false"/>
    </style:style>
    <style:style style:name="P38" style:family="paragraph" style:parent-style-name="Text_20_body">
      <style:paragraph-properties fo:margin-left="0.1543in" fo:margin-right="5.0256in" fo:line-height="115%" fo:text-indent="0in" style:auto-text-indent="false"/>
    </style:style>
    <style:style style:name="P39" style:family="paragraph" style:parent-style-name="Text_20_body">
      <style:paragraph-properties fo:margin-left="0.1543in" fo:margin-right="5.6472in" fo:line-height="115%" fo:text-indent="-0.0854in" style:auto-text-indent="false"/>
    </style:style>
    <style:style style:name="P40" style:family="paragraph" style:parent-style-name="Text_20_body">
      <style:paragraph-properties fo:margin-left="0.1543in" fo:margin-right="4.9154in" fo:line-height="115%" fo:text-indent="0in" style:auto-text-indent="false"/>
    </style:style>
    <style:style style:name="P41" style:family="paragraph" style:parent-style-name="Text_20_body">
      <style:paragraph-properties fo:margin-left="0.1543in" fo:margin-right="5.0339in" fo:line-height="115%" fo:text-indent="0in" style:auto-text-indent="false"/>
    </style:style>
    <style:style style:name="P42" style:family="paragraph" style:parent-style-name="Text_20_body">
      <style:paragraph-properties fo:margin-left="0.0693in" fo:margin-right="3.6098in" fo:margin-top="0.0638in" fo:margin-bottom="0in" style:line-height-at-least="0.4028in" fo:text-indent="0in" style:auto-text-indent="false"/>
    </style:style>
    <style:style style:name="P43" style:family="paragraph" style:parent-style-name="Text_20_body">
      <style:paragraph-properties fo:margin-left="0.3236in" fo:margin-right="4.3366in" fo:margin-top="0.0272in" fo:margin-bottom="0in" fo:line-height="115%" fo:text-indent="-0.0854in" style:auto-text-indent="false"/>
    </style:style>
    <style:style style:name="P44" style:family="paragraph" style:parent-style-name="Text_20_body">
      <style:paragraph-properties fo:margin-left="0.2717in" fo:margin-right="4.172in" fo:text-align="center" style:justify-single-word="false" fo:text-indent="0in" style:auto-text-indent="false"/>
    </style:style>
    <style:style style:name="P45" style:family="paragraph" style:parent-style-name="Text_20_body">
      <style:paragraph-properties fo:margin-left="0.2283in" fo:margin-right="4.172in" fo:margin-top="0.0264in" fo:margin-bottom="0in" fo:text-align="center" style:justify-single-word="false" fo:text-indent="0in" style:auto-text-indent="false"/>
    </style:style>
    <style:style style:name="P46" style:family="paragraph" style:parent-style-name="Text_20_body">
      <style:paragraph-properties fo:margin-left="0.3992in" fo:margin-right="3.8339in" fo:margin-top="0.0264in" fo:margin-bottom="0in" fo:text-align="center" style:justify-single-word="false" fo:text-indent="0in" style:auto-text-indent="false"/>
    </style:style>
    <style:style style:name="P47" style:family="paragraph" style:parent-style-name="Text_20_body">
      <style:paragraph-properties fo:margin-left="1.0866in" fo:margin-right="2.2154in" fo:margin-top="0.0264in" fo:margin-bottom="0in" fo:line-height="115%" fo:text-indent="-0.1701in" style:auto-text-indent="false"/>
    </style:style>
    <style:style style:name="P48" style:family="paragraph" style:parent-style-name="Text_20_body">
      <style:paragraph-properties fo:margin-left="0.748in" fo:margin-right="0in" fo:text-indent="0in" style:auto-text-indent="false"/>
    </style:style>
    <style:style style:name="P49" style:family="paragraph" style:parent-style-name="Text_20_body">
      <style:paragraph-properties fo:margin-left="0.578in" fo:margin-right="0in" fo:text-indent="0in" style:auto-text-indent="false"/>
    </style:style>
    <style:style style:name="P50" style:family="paragraph" style:parent-style-name="Text_20_body">
      <style:paragraph-properties fo:margin-left="0.578in" fo:margin-right="0in" fo:margin-top="0.0264in" fo:margin-bottom="0in" fo:text-indent="0in" style:auto-text-indent="false"/>
    </style:style>
    <style:style style:name="P51" style:family="paragraph" style:parent-style-name="Text_20_body" style:master-page-name="Converted4">
      <style:paragraph-properties fo:margin-left="0.578in" fo:margin-right="0in" fo:margin-top="0.0555in" fo:margin-bottom="0in" fo:text-indent="0in" style:auto-text-indent="false" style:page-number="auto"/>
    </style:style>
    <style:style style:name="P52" style:family="paragraph" style:parent-style-name="Text_20_body">
      <style:paragraph-properties fo:margin-left="0.4083in" fo:margin-right="0in" fo:text-indent="0in" style:auto-text-indent="false"/>
    </style:style>
    <style:style style:name="P53" style:family="paragraph" style:parent-style-name="Text_20_body">
      <style:paragraph-properties fo:margin-left="0.4083in" fo:margin-right="0in" fo:margin-top="0.0264in" fo:margin-bottom="0in" fo:text-indent="0in" style:auto-text-indent="false"/>
    </style:style>
    <style:style style:name="P54" style:family="paragraph" style:parent-style-name="Text_20_body">
      <style:paragraph-properties fo:margin-left="0.578in" fo:margin-right="2.2154in" fo:line-height="115%" fo:text-indent="0in" style:auto-text-indent="false"/>
    </style:style>
    <style:style style:name="P55" style:family="paragraph" style:parent-style-name="Text_20_body">
      <style:paragraph-properties fo:margin-left="0.578in" fo:margin-right="2.2154in" fo:margin-top="0.0264in" fo:margin-bottom="0in" fo:line-height="115%" fo:text-indent="0in" style:auto-text-indent="false"/>
    </style:style>
    <style:style style:name="P56" style:family="paragraph" style:parent-style-name="Text_20_body">
      <style:paragraph-properties fo:margin-left="0.578in" fo:margin-right="2.2154in" fo:margin-top="0.0008in" fo:margin-bottom="0in" fo:line-height="115%" fo:text-indent="0in" style:auto-text-indent="false"/>
    </style:style>
    <style:style style:name="P57" style:family="paragraph" style:parent-style-name="Text_20_body">
      <style:paragraph-properties fo:margin-top="0.002in" fo:margin-bottom="0in"/>
      <style:text-properties fo:font-size="12.5pt" style:font-size-asian="12.5pt"/>
    </style:style>
    <style:style style:name="P58" style:family="paragraph" style:parent-style-name="Text_20_body">
      <style:paragraph-properties fo:margin-top="0.0028in" fo:margin-bottom="0in"/>
      <style:text-properties fo:font-size="12.5pt" style:font-size-asian="12.5pt"/>
    </style:style>
    <style:style style:name="P59" style:family="paragraph" style:parent-style-name="Text_20_body">
      <style:paragraph-properties fo:margin-left="0.578in" fo:margin-right="2.7862in" fo:margin-top="0.0008in" fo:margin-bottom="0in" fo:line-height="115%" fo:text-indent="0in" style:auto-text-indent="false"/>
    </style:style>
    <style:style style:name="P60" style:family="paragraph" style:parent-style-name="Text_20_body">
      <style:paragraph-properties fo:margin-left="0.578in" fo:margin-right="2.5764in" fo:line-height="115%" fo:text-indent="0in" style:auto-text-indent="false"/>
    </style:style>
    <style:style style:name="P61" style:family="paragraph" style:parent-style-name="Text_20_body">
      <style:paragraph-properties fo:margin-left="0.578in" fo:margin-right="2.2154in" fo:line-height="115%" fo:text-indent="0.0425in" style:auto-text-indent="false"/>
    </style:style>
    <style:style style:name="P62" style:family="paragraph" style:parent-style-name="Text_20_body">
      <style:paragraph-properties fo:margin-left="0.3236in" fo:margin-right="0in" fo:margin-top="0.0646in" fo:margin-bottom="0in" fo:text-indent="0in" style:auto-text-indent="false"/>
    </style:style>
    <style:style style:name="P63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64" style:family="paragraph" style:parent-style-name="Standard">
      <style:paragraph-properties style:line-height-at-least="0.198in"/>
      <style:text-properties fo:color="#cccccc" fo:background-color="#1f1f1f"/>
    </style:style>
    <style:style style:name="P65" style:family="paragraph" style:parent-style-name="Standard">
      <style:paragraph-properties style:line-height-at-least="0.198in"/>
    </style:style>
    <style:style style:name="P66" style:family="paragraph" style:parent-style-name="Standard">
      <style:paragraph-properties style:line-height-at-least="0.198in"/>
      <style:text-properties fo:color="#d4d4d4" fo:background-color="#1f1f1f"/>
    </style:style>
    <style:style style:name="P67" style:family="paragraph" style:parent-style-name="Standard">
      <style:paragraph-properties fo:margin-left="0.0693in" fo:margin-right="0in" fo:margin-top="0in" fo:margin-bottom="0in" fo:text-align="start" style:justify-single-word="false" fo:text-indent="0in" style:auto-text-indent="false"/>
    </style:style>
    <style:style style:name="P68" style:family="paragraph" style:parent-style-name="Standard">
      <style:paragraph-properties fo:margin-left="0.0693in" fo:margin-right="0in" fo:margin-top="0.0283in" fo:margin-bottom="0in" fo:text-align="start" style:justify-single-word="false" fo:text-indent="0in" style:auto-text-indent="false"/>
    </style:style>
    <style:style style:name="P69" style:family="paragraph" style:parent-style-name="Standard">
      <style:paragraph-properties fo:margin-left="0.0693in" fo:margin-right="0in" fo:margin-top="0.0291in" fo:margin-bottom="0in" fo:text-align="start" style:justify-single-word="false" fo:text-indent="0in" style:auto-text-indent="false"/>
    </style:style>
    <style:style style:name="P70" style:family="paragraph" style:parent-style-name="Standard">
      <style:paragraph-properties fo:margin-left="0.0693in" fo:margin-right="4.5091in" fo:margin-top="0.0008in" fo:margin-bottom="0in" fo:line-height="115%" fo:text-align="start" style:justify-single-word="false" fo:text-indent="0in" style:auto-text-indent="false"/>
    </style:style>
    <style:style style:name="P71" style:family="paragraph" style:parent-style-name="Standard">
      <style:paragraph-properties fo:margin-left="0.0693in" fo:margin-right="4.5091in" fo:margin-top="0.0008in" fo:margin-bottom="0in" fo:line-height="115%" fo:text-align="start" style:justify-single-word="false" fo:text-indent="0in" style:auto-text-indent="false"/>
      <style:text-properties fo:color="#cccccc" style:font-name="Consolas" fo:font-size="10.5pt" fo:font-weight="normal" fo:background-color="#1f1f1f"/>
    </style:style>
    <style:style style:name="P72" style:family="paragraph" style:parent-style-name="Standard">
      <style:paragraph-properties fo:margin-left="0.0693in" fo:margin-right="2.7862in" fo:margin-top="0.0283in" fo:margin-bottom="0in" fo:line-height="115%" fo:text-align="start" style:justify-single-word="false" fo:text-indent="0in" style:auto-text-indent="false"/>
    </style:style>
    <style:style style:name="P73" style:family="paragraph" style:parent-style-name="Standard">
      <style:paragraph-properties fo:margin-left="0.0693in" fo:margin-right="3.0366in" fo:margin-top="0in" fo:margin-bottom="0in" fo:line-height="115%" fo:text-align="start" style:justify-single-word="false" fo:text-indent="0in" style:auto-text-indent="false"/>
    </style:style>
    <style:style style:name="P74" style:family="paragraph" style:parent-style-name="Standard">
      <style:paragraph-properties fo:margin-left="0.1618in" fo:margin-right="0in" fo:margin-top="0in" fo:margin-bottom="0in" fo:text-align="start" style:justify-single-word="false" fo:text-indent="0in" style:auto-text-indent="false"/>
    </style:style>
    <style:style style:name="P75" style:family="paragraph" style:parent-style-name="Standard">
      <style:paragraph-properties fo:margin-left="0.1618in" fo:margin-right="0in" fo:margin-top="0.0291in" fo:margin-bottom="0in" fo:text-align="start" style:justify-single-word="false" fo:text-indent="0in" style:auto-text-indent="false"/>
    </style:style>
    <style:style style:name="P76" style:family="paragraph" style:parent-style-name="Standard">
      <style:paragraph-properties fo:margin-left="0.2543in" fo:margin-right="0in" fo:margin-top="0.0283in" fo:margin-bottom="0in" fo:text-align="start" style:justify-single-word="false" fo:text-indent="0in" style:auto-text-indent="false"/>
    </style:style>
    <style:style style:name="P77" style:family="paragraph" style:parent-style-name="Standard">
      <style:paragraph-properties fo:margin-left="0.2543in" fo:margin-right="0in" fo:margin-top="0.0283in" fo:margin-bottom="0in" fo:text-align="start" style:justify-single-word="false" fo:text-indent="0in" style:auto-text-indent="false">
        <style:tab-stops>
          <style:tab-stop style:position="0.5783in"/>
        </style:tab-stops>
      </style:paragraph-properties>
    </style:style>
    <style:style style:name="P78" style:family="paragraph" style:parent-style-name="Standard">
      <style:paragraph-properties fo:margin-left="0.2543in" fo:margin-right="0in" fo:margin-top="0.0283in" fo:margin-bottom="0in" fo:text-align="start" style:justify-single-word="false" fo:text-indent="0in" style:auto-text-indent="false">
        <style:tab-stops>
          <style:tab-stop style:position="0.6709in"/>
        </style:tab-stops>
      </style:paragraph-properties>
    </style:style>
    <style:style style:name="P79" style:family="paragraph" style:parent-style-name="Standard">
      <style:paragraph-properties fo:margin-left="0.2543in" fo:margin-right="0in" fo:margin-top="0.0291in" fo:margin-bottom="0in" fo:text-align="start" style:justify-single-word="false" fo:text-indent="0in" style:auto-text-indent="false"/>
    </style:style>
    <style:style style:name="P80" style:family="paragraph" style:parent-style-name="Standard">
      <style:paragraph-properties fo:margin-left="0.2543in" fo:margin-right="0in" fo:margin-top="0.0291in" fo:margin-bottom="0in" fo:text-align="start" style:justify-single-word="false" fo:text-indent="0in" style:auto-text-indent="false">
        <style:tab-stops>
          <style:tab-stop style:position="0.5783in"/>
        </style:tab-stops>
      </style:paragraph-properties>
    </style:style>
    <style:style style:name="P81" style:family="paragraph" style:parent-style-name="Standard">
      <style:paragraph-properties fo:margin-left="0.2543in" fo:margin-right="0in" fo:margin-top="0.0291in" fo:margin-bottom="0in" fo:text-align="start" style:justify-single-word="false" fo:text-indent="0in" style:auto-text-indent="false">
        <style:tab-stops>
          <style:tab-stop style:position="0.6709in"/>
        </style:tab-stops>
      </style:paragraph-properties>
    </style:style>
    <style:style style:name="P82" style:family="paragraph" style:parent-style-name="Standard">
      <style:paragraph-properties fo:margin-left="0.2543in" fo:margin-right="0in" fo:margin-top="0.0008in" fo:margin-bottom="0in" fo:text-align="start" style:justify-single-word="false" fo:text-indent="0in" style:auto-text-indent="false"/>
    </style:style>
    <style:style style:name="P83" style:family="paragraph" style:parent-style-name="Standard" style:master-page-name="Converted1">
      <style:paragraph-properties fo:margin-left="0.3472in" fo:margin-right="0in" fo:margin-top="0.0555in" fo:margin-bottom="0in" fo:text-align="start" style:justify-single-word="false" fo:text-indent="0in" style:auto-text-indent="false" style:page-number="auto"/>
    </style:style>
    <style:style style:name="P84" style:family="paragraph" style:parent-style-name="Standard">
      <style:paragraph-properties fo:margin-left="0.3472in" fo:margin-right="0in" fo:margin-top="0.0283in" fo:margin-bottom="0in" fo:text-align="start" style:justify-single-word="false" fo:text-indent="0in" style:auto-text-indent="false"/>
    </style:style>
    <style:style style:name="P85" style:family="paragraph" style:parent-style-name="Standard">
      <style:paragraph-properties fo:margin-left="0.3472in" fo:margin-right="0in" fo:margin-top="0.0291in" fo:margin-bottom="0in" fo:text-align="start" style:justify-single-word="false" fo:text-indent="0in" style:auto-text-indent="false"/>
    </style:style>
    <style:style style:name="P86" style:family="paragraph" style:parent-style-name="Standard">
      <style:paragraph-properties fo:margin-left="0.3472in" fo:margin-right="0in" fo:margin-top="0in" fo:margin-bottom="0in" fo:text-align="start" style:justify-single-word="false" fo:text-indent="0in" style:auto-text-indent="false"/>
    </style:style>
    <style:style style:name="P87" style:family="paragraph" style:parent-style-name="Standard">
      <style:paragraph-properties fo:margin-top="0in" fo:margin-bottom="0.1965in" style:line-height-at-least="0.198in"/>
    </style:style>
    <style:style style:name="P88" style:family="paragraph" style:parent-style-name="Standard">
      <style:paragraph-properties fo:margin-left="0.0693in" fo:margin-right="3.6098in" fo:margin-top="0.0638in" fo:margin-bottom="0in" style:line-height-at-least="0.4028in" fo:text-indent="0in" style:auto-text-indent="false"/>
      <style:text-properties fo:color="#cccccc" style:font-name="Consolas" fo:font-size="10.5pt" fo:font-weight="normal" fo:background-color="#1f1f1f"/>
    </style:style>
    <style:style style:name="P89" style:family="paragraph" style:parent-style-name="Heading_20_1">
      <style:paragraph-properties fo:margin-top="0.0626in" fo:margin-bottom="0in"/>
    </style:style>
    <style:style style:name="P90" style:family="paragraph" style:parent-style-name="Heading_20_1" style:master-page-name="Converted5">
      <style:paragraph-properties style:page-number="auto"/>
    </style:style>
    <style:style style:name="P91" style:family="paragraph" style:parent-style-name="Table_20_Paragraph">
      <style:paragraph-properties fo:margin-top="0.0736in" fo:margin-bottom="0in"/>
    </style:style>
    <style:style style:name="P92" style:family="paragraph" style:parent-style-name="Table_20_Paragraph">
      <style:paragraph-properties fo:margin-top="0.072in" fo:margin-bottom="0in"/>
    </style:style>
    <style:style style:name="P93" style:family="paragraph" style:parent-style-name="Table_20_Paragraph">
      <style:paragraph-properties fo:margin-top="0.0709in" fo:margin-bottom="0in"/>
    </style:style>
    <style:style style:name="P94" style:family="paragraph" style:parent-style-name="Table_20_Paragraph">
      <style:paragraph-properties fo:margin-left="0.1047in" fo:margin-right="0in" fo:margin-top="0.0709in" fo:margin-bottom="0in" fo:text-indent="0in" style:auto-text-indent="false"/>
    </style:style>
    <style:style style:name="P95" style:family="paragraph" style:parent-style-name="Heading_20_2">
      <style:paragraph-properties fo:margin-top="0.0008in" fo:margin-bottom="0in"/>
    </style:style>
    <style:style style:name="P96" style:family="paragraph" style:parent-style-name="Heading_20_2">
      <style:paragraph-properties fo:margin-top="0.0634in" fo:margin-bottom="0in"/>
    </style:style>
    <style:style style:name="P97" style:family="paragraph">
      <style:paragraph-properties fo:text-align="center"/>
      <style:text-properties fo:font-size="18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letter-spacing="-0.0035in" fo:font-weight="bold" style:font-size-asian="11pt" style:font-weight-asian="bold"/>
    </style:style>
    <style:style style:name="T3" style:family="text">
      <style:text-properties fo:font-size="11pt" fo:letter-spacing="-0.0028in" fo:font-weight="bold" style:font-size-asian="11pt" style:font-weight-asian="bold"/>
    </style:style>
    <style:style style:name="T4" style:family="text">
      <style:text-properties fo:font-size="11pt" fo:letter-spacing="-0.0043in" fo:font-weight="bold" style:font-size-asian="11pt" style:font-weight-asian="bold"/>
    </style:style>
    <style:style style:name="T5" style:family="text">
      <style:text-properties fo:letter-spacing="-0.0035in"/>
    </style:style>
    <style:style style:name="T6" style:family="text">
      <style:text-properties fo:letter-spacing="-0.0028in"/>
    </style:style>
    <style:style style:name="T7" style:family="text">
      <style:text-properties fo:letter-spacing="-0.0043in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letter-spacing="-0.0453in" style:font-size-asian="12pt"/>
    </style:style>
    <style:style style:name="T10" style:family="text">
      <style:text-properties fo:font-size="12pt" fo:letter-spacing="0.0008in" style:font-size-asian="12pt"/>
    </style:style>
    <style:style style:name="T11" style:family="text">
      <style:text-properties fo:font-size="12pt" fo:letter-spacing="0.0465in" style:font-size-asian="12pt"/>
    </style:style>
    <style:style style:name="T12" style:family="text">
      <style:text-properties fo:font-size="12pt" fo:letter-spacing="-0.0063in" style:font-size-asian="12pt"/>
    </style:style>
    <style:style style:name="T13" style:family="text">
      <style:text-properties fo:letter-spacing="0.0008in"/>
    </style:style>
    <style:style style:name="T14" style:family="text">
      <style:text-properties fo:letter-spacing="-0.0063in"/>
    </style:style>
    <style:style style:name="T15" style:family="text">
      <style:text-properties fo:letter-spacing="-0.002in"/>
    </style:style>
    <style:style style:name="T16" style:family="text">
      <style:text-properties fo:letter-spacing="-0.0075in"/>
    </style:style>
    <style:style style:name="T17" style:family="text">
      <style:text-properties fo:letter-spacing="-0.0071in"/>
    </style:style>
    <style:style style:name="T18" style:family="text">
      <style:text-properties fo:letter-spacing="-0.0055in"/>
    </style:style>
    <style:style style:name="T19" style:family="text">
      <style:text-properties fo:letter-spacing="-0.0008in"/>
    </style:style>
    <style:style style:name="T20" style:family="text">
      <style:text-properties fo:letter-spacing="-0.0409in"/>
    </style:style>
    <style:style style:name="T21" style:family="text">
      <style:text-properties fo:letter-spacing="-0.0016in"/>
    </style:style>
    <style:style style:name="T22" style:family="text">
      <style:text-properties fo:letter-spacing="-0.0402in"/>
    </style:style>
    <style:style style:name="T23" style:family="text">
      <style:text-properties fo:letter-spacing="0.0425in"/>
    </style:style>
    <style:style style:name="T24" style:family="text">
      <style:text-properties fo:letter-spacing="-0.0083in"/>
    </style:style>
    <style:style style:name="T25" style:family="text">
      <style:text-properties fo:letter-spacing="-0.0047in"/>
    </style:style>
    <style:style style:name="T26" style:family="text">
      <style:text-properties fo:letter-spacing="-0.011in"/>
    </style:style>
    <style:style style:name="T27" style:family="text">
      <style:text-properties fo:letter-spacing="-0.0091in"/>
    </style:style>
    <style:style style:name="T28" style:family="text">
      <style:text-properties fo:letter-spacing="-0.0102in"/>
    </style:style>
    <style:style style:name="T29" style:family="text">
      <style:text-properties fo:letter-spacing="-0.0098in"/>
    </style:style>
    <style:style style:name="T30" style:family="text">
      <style:text-properties fo:color="#c586c0"/>
    </style:style>
    <style:style style:name="T31" style:family="text">
      <style:text-properties fo:color="#c586c0" fo:font-size="12pt" style:font-size-asian="12pt"/>
    </style:style>
    <style:style style:name="T32" style:family="text">
      <style:text-properties fo:color="#c586c0" style:font-name="Consolas" fo:font-size="10.5pt" fo:font-weight="normal"/>
    </style:style>
    <style:style style:name="T33" style:family="text">
      <style:text-properties fo:color="#cccccc" style:font-name="Consolas" fo:font-size="10.5pt" fo:font-weight="normal" fo:background-color="#1f1f1f"/>
    </style:style>
    <style:style style:name="T34" style:family="text">
      <style:text-properties fo:color="#9cdcfe"/>
    </style:style>
    <style:style style:name="T35" style:family="text">
      <style:text-properties fo:color="#9cdcfe" fo:font-size="12pt" style:font-size-asian="12pt"/>
    </style:style>
    <style:style style:name="T36" style:family="text">
      <style:text-properties fo:color="#9cdcfe" style:font-name="Consolas" fo:font-size="10.5pt" fo:font-weight="normal"/>
    </style:style>
    <style:style style:name="T37" style:family="text">
      <style:text-properties fo:color="#ce9178"/>
    </style:style>
    <style:style style:name="T38" style:family="text">
      <style:text-properties fo:color="#ce9178" fo:font-size="12pt" style:font-size-asian="12pt"/>
    </style:style>
    <style:style style:name="T39" style:family="text">
      <style:text-properties fo:color="#ce9178" style:font-name="Consolas" fo:font-size="10.5pt" fo:font-weight="normal"/>
    </style:style>
    <style:style style:name="T40" style:family="text">
      <style:text-properties fo:color="#569cd6"/>
    </style:style>
    <style:style style:name="T41" style:family="text">
      <style:text-properties fo:color="#569cd6" style:font-name="Consolas" fo:font-size="10.5pt" fo:font-weight="normal"/>
    </style:style>
    <style:style style:name="T42" style:family="text">
      <style:text-properties fo:color="#dcdcaa"/>
    </style:style>
    <style:style style:name="T43" style:family="text">
      <style:text-properties fo:color="#dcdcaa" style:font-name="Consolas" fo:font-size="10.5pt" fo:font-weight="normal"/>
    </style:style>
    <style:style style:name="T44" style:family="text">
      <style:text-properties style:font-name="Consolas" fo:font-size="10.5pt" fo:font-weight="normal"/>
    </style:style>
    <style:style style:name="T45" style:family="text">
      <style:text-properties fo:color="#808080" style:font-name="Consolas" fo:font-size="10.5pt" fo:font-weight="normal"/>
    </style:style>
    <style:style style:name="T46" style:family="text">
      <style:text-properties fo:color="#d4d4d4"/>
    </style:style>
    <style:style style:name="T47" style:family="text">
      <style:text-properties fo:color="#d4d4d4" style:font-name="Consolas" fo:font-size="10.5pt" fo:font-weight="normal"/>
    </style:style>
    <style:style style:name="T48" style:family="text">
      <style:text-properties fo:color="#6a9955" style:font-name="Consolas" fo:font-size="10.5pt" fo:font-weight="normal"/>
    </style:style>
    <style:style style:name="T49" style:family="text">
      <style:text-properties fo:color="#4ec9b0" style:font-name="Consolas" fo:font-size="10.5pt" fo:font-weight="normal"/>
    </style:style>
    <style:style style:name="T50" style:family="text">
      <style:text-properties fo:color="#d7ba7d"/>
    </style:style>
    <style:style style:name="T51" style:family="text">
      <style:text-properties fo:color="#d7ba7d" style:font-name="Consolas" fo:font-size="10.5pt" fo:font-weight="normal"/>
    </style:style>
    <style:style style:name="T52" style:family="text">
      <style:text-properties fo:color="#d7ba7d" style:font-name="Consolas" fo:font-size="10.5pt" fo:font-weight="normal" fo:background-color="#1f1f1f"/>
    </style:style>
    <style:style style:name="T53" style:family="text">
      <style:text-properties fo:color="#b5cea8" style:font-name="Consolas" fo:font-size="10.5pt" fo:font-weight="normal"/>
    </style:style>
    <style:style style:name="T54" style:family="text">
      <style:text-properties fo:color="#4fc1ff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97" svg:width="2.7705in" svg:height="2.9996in" svg:x="0in" svg:y="0in">
        <draw:image xlink:href="Pictures/100000000000010A00000120EFFC3574.png" xlink:type="simple" xlink:show="embed" xlink:actuate="onLoad">
          <text:p/>
        </draw:image>
      </draw:frame>
      <draw:frame text:anchor-type="page" text:anchor-page-number="0" draw:z-index="1" draw:name="image2.png" draw:style-name="gr1" draw:text-style-name="P97" svg:width="2.7425in" svg:height="2.9185in" svg:x="0in" svg:y="0in">
        <draw:image xlink:href="Pictures/100000000000010A0000011BE87CFF36.png" xlink:type="simple" xlink:show="embed" xlink:actuate="onLoad">
          <text:p/>
        </draw:image>
      </draw:frame>
      <text:section text:style-name="Sect1" text:name="TextSection">
        <text:p text:style-name="P8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91"><text:span text:style-name="T1">Program</text:span><text:span text:style-name="T2"> </text:span><text:span text:style-name="T1">No:</text:span></text:p>
            </table:table-cell>
            <table:table-cell table:style-name="Table1.A1" office:value-type="string">
              <text:p text:style-name="P91"><text:span text:style-name="T1">17</text:span></text:p>
            </table:table-cell>
          </table:table-row>
          <table:table-row table:style-name="Table1.2">
            <table:table-cell table:style-name="Table1.A1" office:value-type="string">
              <text:p text:style-name="P92"><text:span text:style-name="T1">Roll</text:span><text:span text:style-name="T3"> </text:span><text:span text:style-name="T1">No:</text:span></text:p>
            </table:table-cell>
            <table:table-cell table:style-name="Table1.B2" office:value-type="float" office:value="1525">
              <text:p text:style-name="P92"><text:span text:style-name="T1">1525</text:span></text:p>
            </table:table-cell>
          </table:table-row>
          <table:table-row table:style-name="Table1.1">
            <table:table-cell table:style-name="Table1.A1" office:value-type="string">
              <text:p text:style-name="P93"><text:span text:style-name="T1">Title:</text:span></text:p>
            </table:table-cell>
            <table:table-cell table:style-name="Table1.A1" office:value-type="string">
              <text:p text:style-name="P94"><text:span text:style-name="T1">Build</text:span><text:span text:style-name="T4"> </text:span><text:span text:style-name="T1">a</text:span><text:span text:style-name="T2"> </text:span><text:span text:style-name="T1">Calculator</text:span><text:span text:style-name="T2"> </text:span><text:span text:style-name="T1">using</text:span><text:span text:style-name="T2"> </text:span><text:span text:style-name="T1">Hooks</text:span></text:p>
            </table:table-cell>
          </table:table-row>
          <table:table-row table:style-name="Table1.1">
            <table:table-cell table:style-name="Table1.A1" office:value-type="string">
              <text:p text:style-name="Table_20_Paragraph"><text:span text:style-name="T1">Objectives:</text:span></text:p>
            </table:table-cell>
            <table:table-cell table:style-name="Table1.A1" office:value-type="string">
              <text:p text:style-name="Table_20_Paragraph"><text:span text:style-name="T1">Making</text:span><text:span text:style-name="T4"> </text:span><text:span text:style-name="T1">a</text:span><text:span text:style-name="T2"> </text:span><text:span text:style-name="T1">calculator</text:span></text:p>
            </table:table-cell>
          </table:table-row>
        </table:table>
        <text:p text:style-name="P1"/>
        <text:p text:style-name="P9"/>
        <text:list xml:id="list3944773691261901896" text:style-name="Outline">
          <text:list-item>
            <text:h text:style-name="P89" text:outline-level="1">SOURCE CODE:</text:h>
          </text:list-item>
        </text:list>
        <text:p text:style-name="P2"/>
        <text:list xml:id="list34759669" text:continue-numbering="true" text:style-name="Outline">
          <text:list-item>
            <text:list>
              <text:list-item>
                <text:h text:style-name="Heading_20_2" text:outline-level="2">App.js</text:h>
              </text:list-item>
            </text:list>
          </text:list-item>
        </text:list>
        <text:p text:style-name="P12"/>
        <text:p text:style-name="P71"><text:span text:style-name="T31">import</text:span><text:span text:style-name="T8"> </text:span><text:span text:style-name="T35">React</text:span><text:span text:style-name="T8"> </text:span><text:span text:style-name="T31">from</text:span><text:span text:style-name="T8"> </text:span><text:span text:style-name="T38">'react'</text:span><text:span text:style-name="T8">;</text:span></text:p>
        <text:p text:style-name="P63"><text:span text:style-name="T30">import</text:span> <text:span text:style-name="T34">logo</text:span> <text:span text:style-name="T30">from</text:span> <text:span text:style-name="T37">'./logo.svg'</text:span>;</text:p>
        <text:p text:style-name="P63"><text:span text:style-name="T30">import</text:span> <text:span text:style-name="T37">'./App.css'</text:span>;</text:p>
        <text:p text:style-name="P63"><text:span text:style-name="T30">import</text:span> <text:span text:style-name="T34">Greet</text:span> <text:span text:style-name="T30">from</text:span> <text:span text:style-name="T37">'./components/Greet'</text:span>;</text:p>
        <text:p text:style-name="P63"><text:span text:style-name="T30">import</text:span> <text:span text:style-name="T34">Message</text:span> <text:span text:style-name="T30">from</text:span> <text:span text:style-name="T37">'./components/Message'</text:span>;</text:p>
        <text:p text:style-name="P63"><text:span text:style-name="T30">import</text:span> <text:span text:style-name="T34">Counter</text:span> <text:span text:style-name="T30">from</text:span> <text:span text:style-name="T37">'./components/Counter'</text:span>;</text:p>
        <text:p text:style-name="P63"><text:span text:style-name="T30">import</text:span> { <text:span text:style-name="T34">Form</text:span> } <text:span text:style-name="T30">from</text:span> <text:span text:style-name="T37">'./components/Form'</text:span>;</text:p>
        <text:p text:style-name="P63"><text:span text:style-name="T30">import</text:span> <text:span text:style-name="T34">Calculator</text:span> <text:span text:style-name="T30">from</text:span> <text:span text:style-name="T37">'./components/Calculator'</text:span>;</text:p>
        <text:p text:style-name="P63"><text:span text:style-name="T40">function</text:span> <text:span text:style-name="T42">App</text:span>() {</text:p>
        <text:p text:style-name="P64">  <text:span text:style-name="T32">return</text:span><text:span text:style-name="T44"> (</text:span></text:p>
        <text:p text:style-name="P64">    <text:span text:style-name="T45">&lt;</text:span><text:span text:style-name="T41">div</text:span><text:span text:style-name="T44"> </text:span><text:span text:style-name="T36">className</text:span><text:span text:style-name="T47">=</text:span><text:span text:style-name="T39">"App"</text:span><text:span text:style-name="T45">&gt;</text:span></text:p>
        <text:p text:style-name="P64">      <text:span text:style-name="T41">{</text:span><text:span text:style-name="T48">/* &lt;Message/&gt; */</text:span><text:span text:style-name="T41">}</text:span></text:p>
        <text:p text:style-name="P64">      <text:span text:style-name="T41">{</text:span><text:span text:style-name="T48">/* &lt;Counter/&gt; */</text:span><text:span text:style-name="T41">}</text:span></text:p>
        <text:p text:style-name="P64">       <text:span text:style-name="T45">&lt;</text:span><text:span text:style-name="T49">Calculator</text:span><text:span text:style-name="T45">/&gt;</text:span></text:p>
        <text:p text:style-name="P64">     </text:p>
        <text:p text:style-name="P64">    <text:span text:style-name="T45">&lt;/</text:span><text:span text:style-name="T41">div</text:span><text:span text:style-name="T45">&gt;</text:span></text:p>
        <text:p text:style-name="P64">  <text:span text:style-name="T44">);</text:span></text:p>
        <text:p text:style-name="P63">}</text:p>
        <text:p text:style-name="P65"/>
        <text:p text:style-name="P63"><text:span text:style-name="T30">export</text:span> <text:span text:style-name="T30">default</text:span> <text:span text:style-name="T34">App</text:span>;</text:p>
        <text:p text:style-name="P63"/>
        <text:p text:style-name="P70"><text:span text:style-name="T8"/></text:p>
      </text:section>
      <text:p text:style-name="P6"/>
      <text:p text:style-name="P20"/>
      <text:list xml:id="list34766370" text:continue-numbering="true" text:style-name="Outline">
        <text:list-item>
          <text:list>
            <text:list-item>
              <text:h text:style-name="P95" text:outline-level="2">App.css</text:h>
            </text:list-item>
          </text:list>
        </text:list-item>
      </text:list>
      <text:p text:style-name="P21"/>
      <text:p text:style-name="P17"><text:s/></text:p>
      <text:p text:style-name="Standard"><text:s text:c="2"/></text:p>
      <text:p text:style-name="P63"><text:span text:style-name="T50">.App</text:span> {</text:p>
      <text:p text:style-name="P64">  <text:span text:style-name="T36">align-items</text:span><text:span text:style-name="T44">: </text:span><text:span text:style-name="T39">center</text:span><text:span text:style-name="T44">;</text:span></text:p>
      <text:p text:style-name="P64">  <text:span text:style-name="T36">text-align</text:span><text:span text:style-name="T44">: </text:span><text:span text:style-name="T39">center</text:span><text:span text:style-name="T44">;</text:span></text:p>
      <text:p text:style-name="P64"><text:soft-page-break/>  <text:span text:style-name="T36">background-color</text:span><text:span text:style-name="T44">: </text:span><text:span text:style-name="T39">greenyellow</text:span><text:span text:style-name="T44">;</text:span></text:p>
      <text:p text:style-name="P64"> </text:p>
      <text:p text:style-name="P64">  <text:span text:style-name="T36">color</text:span><text:span text:style-name="T44">: </text:span><text:span text:style-name="T39">brown</text:span><text:span text:style-name="T44">;</text:span></text:p>
      <text:p text:style-name="P63">}</text:p>
      <text:p text:style-name="P87"/>
      <text:p text:style-name="P63"><text:span text:style-name="T50">.App-logo</text:span> {</text:p>
      <text:p text:style-name="P64">  <text:span text:style-name="T36">height</text:span><text:span text:style-name="T44">: </text:span><text:span text:style-name="T53">40vmin</text:span><text:span text:style-name="T44">;</text:span></text:p>
      <text:p text:style-name="P64">  <text:span text:style-name="T36">pointer-events</text:span><text:span text:style-name="T44">: </text:span><text:span text:style-name="T39">none</text:span><text:span text:style-name="T44">;</text:span></text:p>
      <text:p text:style-name="P63">}</text:p>
      <text:p text:style-name="P65"/>
      <text:p text:style-name="P63"><text:span text:style-name="T30">@media</text:span> (prefers-reduced-motion: no-preference) {</text:p>
      <text:p text:style-name="P64">  <text:span text:style-name="T51">.App-logo</text:span><text:span text:style-name="T44"> {</text:span></text:p>
      <text:p text:style-name="P64">    <text:span text:style-name="T36">animation</text:span><text:span text:style-name="T44">: App-logo-spin </text:span><text:span text:style-name="T39">infinite</text:span><text:span text:style-name="T44"> </text:span><text:span text:style-name="T53">20s</text:span><text:span text:style-name="T44"> </text:span><text:span text:style-name="T39">linear</text:span><text:span text:style-name="T44">;</text:span></text:p>
      <text:p text:style-name="P64">  <text:span text:style-name="T44">}</text:span></text:p>
      <text:p text:style-name="P63">}</text:p>
      <text:p text:style-name="P65"/>
      <text:p text:style-name="P63"><text:span text:style-name="T50">.App-header</text:span> {</text:p>
      <text:p text:style-name="P64">  <text:span text:style-name="T36">background-color</text:span><text:span text:style-name="T44">: </text:span><text:span text:style-name="T39">#282c34</text:span><text:span text:style-name="T44">;</text:span></text:p>
      <text:p text:style-name="P64">  <text:span text:style-name="T36">min-height</text:span><text:span text:style-name="T44">: </text:span><text:span text:style-name="T53">100vh</text:span><text:span text:style-name="T44">;</text:span></text:p>
      <text:p text:style-name="P64">  <text:span text:style-name="T36">display</text:span><text:span text:style-name="T44">: </text:span><text:span text:style-name="T39">flex</text:span><text:span text:style-name="T44">;</text:span></text:p>
      <text:p text:style-name="P64">  <text:span text:style-name="T36">flex-direction</text:span><text:span text:style-name="T44">: </text:span><text:span text:style-name="T39">column</text:span><text:span text:style-name="T44">;</text:span></text:p>
      <text:p text:style-name="P64">  <text:span text:style-name="T36">align-items</text:span><text:span text:style-name="T44">: </text:span><text:span text:style-name="T39">center</text:span><text:span text:style-name="T44">;</text:span></text:p>
      <text:p text:style-name="P64">  <text:span text:style-name="T36">justify-content</text:span><text:span text:style-name="T44">: </text:span><text:span text:style-name="T39">center</text:span><text:span text:style-name="T44">;</text:span></text:p>
      <text:p text:style-name="P64">  <text:span text:style-name="T36">font-size</text:span><text:span text:style-name="T44">: </text:span><text:span text:style-name="T43">calc</text:span><text:span text:style-name="T44">(</text:span><text:span text:style-name="T53">10px</text:span><text:span text:style-name="T44"> </text:span><text:span text:style-name="T47">+</text:span><text:span text:style-name="T44"> </text:span><text:span text:style-name="T53">2vmin</text:span><text:span text:style-name="T44">);</text:span></text:p>
      <text:p text:style-name="P64">  <text:span text:style-name="T36">color</text:span><text:span text:style-name="T44">: </text:span><text:span text:style-name="T39">white</text:span><text:span text:style-name="T44">;</text:span></text:p>
      <text:p text:style-name="P63">}</text:p>
      <text:p text:style-name="P65"/>
      <text:p text:style-name="P63"><text:span text:style-name="T50">.App-link</text:span> {</text:p>
      <text:p text:style-name="P64">  <text:span text:style-name="T36">color</text:span><text:span text:style-name="T44">: </text:span><text:span text:style-name="T39">#61dafb</text:span><text:span text:style-name="T44">;</text:span></text:p>
      <text:p text:style-name="P63">}</text:p>
      <text:p text:style-name="P65"/>
      <text:p text:style-name="P63"><text:span text:style-name="T30">@keyframes</text:span> <text:span text:style-name="T34">App-logo-spin</text:span> {</text:p>
      <text:p text:style-name="P64">  <text:span text:style-name="T44">from {</text:span></text:p>
      <text:p text:style-name="P64">    <text:span text:style-name="T36">transform</text:span><text:span text:style-name="T44">: </text:span><text:span text:style-name="T43">rotate</text:span><text:span text:style-name="T44">(</text:span><text:span text:style-name="T53">0deg</text:span><text:span text:style-name="T44">);</text:span></text:p>
      <text:p text:style-name="P64">  <text:span text:style-name="T44">}</text:span></text:p>
      <text:p text:style-name="P64">  <text:span text:style-name="T44">to {</text:span></text:p>
      <text:p text:style-name="P64">    <text:span text:style-name="T36">transform</text:span><text:span text:style-name="T44">: </text:span><text:span text:style-name="T43">rotate</text:span><text:span text:style-name="T44">(</text:span><text:span text:style-name="T53">360deg</text:span><text:span text:style-name="T44">);</text:span></text:p>
      <text:p text:style-name="P64">  <text:span text:style-name="T44">}</text:span></text:p>
      <text:p text:style-name="P63">}</text:p>
      <text:p text:style-name="P63"/>
      <text:p text:style-name="P22"/>
      <text:list xml:id="list34775333" text:continue-numbering="true" text:style-name="Outline">
        <text:list-item>
          <text:list>
            <text:list-item>
              <text:h text:style-name="P96" text:outline-level="2">Calculator.js</text:h>
            </text:list-item>
          </text:list>
        </text:list-item>
      </text:list>
      <text:p text:style-name="P88"><text:span text:style-name="T30">import</text:span> <text:span text:style-name="T34">React</text:span>, { <text:span text:style-name="T34">useState</text:span> } <text:span text:style-name="T30">from</text:span> <text:span text:style-name="T37">'react'</text:span>;</text:p>
      <text:p text:style-name="P65"/>
      <text:p text:style-name="P63"><text:span text:style-name="T40">function</text:span> <text:span text:style-name="T42">Calculator</text:span>() {</text:p>
      <text:p text:style-name="P64">    <text:span text:style-name="T41">const</text:span><text:span text:style-name="T44"> [</text:span><text:span text:style-name="T54">val</text:span><text:span text:style-name="T44">, </text:span><text:span text:style-name="T43">setVal</text:span><text:span text:style-name="T44">] </text:span><text:span text:style-name="T47">=</text:span><text:span text:style-name="T44"> </text:span><text:span text:style-name="T43">useState</text:span><text:span text:style-name="T44">(</text:span><text:span text:style-name="T39">""</text:span><text:span text:style-name="T44">);</text:span></text:p>
      <text:p text:style-name="P65"/>
      <text:p text:style-name="P64">    <text:span text:style-name="T32">return</text:span><text:span text:style-name="T44"> (</text:span></text:p>
      <text:p text:style-name="P64">        <text:span text:style-name="T45">&lt;</text:span><text:span text:style-name="T41">div</text:span><text:span text:style-name="T44"> </text:span><text:span text:style-name="T36">className</text:span><text:span text:style-name="T47">=</text:span><text:span text:style-name="T39">'container'</text:span><text:span text:style-name="T45">&gt;</text:span></text:p>
      <text:p text:style-name="P64">            <text:span text:style-name="T45">&lt;</text:span><text:span text:style-name="T41">div</text:span><text:span text:style-name="T44"> </text:span><text:span text:style-name="T36">className</text:span><text:span text:style-name="T47">=</text:span><text:span text:style-name="T39">'row'</text:span><text:span text:style-name="T45">&gt;</text:span></text:p>
      <text:p text:style-name="P64">                <text:span text:style-name="T45">&lt;</text:span><text:span text:style-name="T41">div</text:span><text:span text:style-name="T44"> </text:span><text:span text:style-name="T36">className</text:span><text:span text:style-name="T47">=</text:span><text:span text:style-name="T39">'col-12'</text:span><text:span text:style-name="T45">&gt;</text:span></text:p>
      <text:p text:style-name="P64">                    <text:span text:style-name="T45">&lt;</text:span><text:span text:style-name="T41">h1</text:span><text:span text:style-name="T44"> </text:span><text:span text:style-name="T36">className</text:span><text:span text:style-name="T47">=</text:span><text:span text:style-name="T39">'display-5 fw-bolder text-primary'</text:span><text:span text:style-name="T45">&gt;</text:span><text:span text:style-name="T44">Simple Calculator</text:span><text:span text:style-name="T45">&lt;/</text:span><text:span text:style-name="T41">h1</text:span><text:span text:style-name="T45">&gt;</text:span></text:p>
      <text:p text:style-name="P64">                <text:span text:style-name="T45">&lt;/</text:span><text:span text:style-name="T41">div</text:span><text:span text:style-name="T45">&gt;</text:span></text:p>
      <text:p text:style-name="P64">            <text:span text:style-name="T45">&lt;/</text:span><text:span text:style-name="T41">div</text:span><text:span text:style-name="T45">&gt;</text:span></text:p>
      <text:p text:style-name="P64">            <text:span text:style-name="T45">&lt;</text:span><text:span text:style-name="T41">div</text:span><text:span text:style-name="T45">&gt;</text:span></text:p>
      <text:p text:style-name="P64">                <text:span text:style-name="T45">&lt;</text:span><text:span text:style-name="T41">input</text:span><text:span text:style-name="T44"> </text:span><text:span text:style-name="T36">type</text:span><text:span text:style-name="T47">=</text:span><text:span text:style-name="T39">'text'</text:span><text:span text:style-name="T44"> </text:span><text:span text:style-name="T36">value</text:span><text:span text:style-name="T47">=</text:span><text:span text:style-name="T41">{</text:span><text:span text:style-name="T54">val</text:span><text:span text:style-name="T41">}</text:span><text:span text:style-name="T44"> </text:span><text:span text:style-name="T36">readOnly</text:span><text:span text:style-name="T44"> </text:span><text:span text:style-name="T45">/&gt;</text:span></text:p>
      <text:p text:style-name="P64">            <text:span text:style-name="T45">&lt;/</text:span><text:span text:style-name="T41">div</text:span><text:span text:style-name="T45">&gt;</text:span></text:p>
      <text:p text:style-name="P64">            <text:span text:style-name="T45">&lt;</text:span><text:span text:style-name="T41">div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1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1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2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2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3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3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+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+</text:span><text:span text:style-name="T45">&lt;/</text:span><text:span text:style-name="T41">button</text:span><text:span text:style-name="T45">&gt;</text:span></text:p>
      <text:p text:style-name="P64">            <text:span text:style-name="T45">&lt;/</text:span><text:span text:style-name="T41">div</text:span><text:span text:style-name="T45">&gt;</text:span></text:p>
      <text:p text:style-name="P64">            <text:span text:style-name="T45">&lt;</text:span><text:span text:style-name="T41">div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4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4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5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5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6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6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-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-</text:span><text:span text:style-name="T45">&lt;/</text:span><text:span text:style-name="T41">button</text:span><text:span text:style-name="T45">&gt;</text:span></text:p>
      <text:p text:style-name="P64">            <text:span text:style-name="T45">&lt;/</text:span><text:span text:style-name="T41">div</text:span><text:span text:style-name="T45">&gt;</text:span></text:p>
      <text:p text:style-name="P64">            <text:span text:style-name="T45">&lt;</text:span><text:span text:style-name="T41">div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7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7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8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8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9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9</text:span><text:span text:style-name="T45">&lt;/</text:span><text:span text:style-name="T41">button</text:span><text:span text:style-name="T45">&gt;</text:span></text:p>
      <text:p text:style-name="P64"><text:soft-page-break/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*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*</text:span><text:span text:style-name="T45">&lt;/</text:span><text:span text:style-name="T41">button</text:span><text:span text:style-name="T45">&gt;</text:span></text:p>
      <text:p text:style-name="P64">            <text:span text:style-name="T45">&lt;/</text:span><text:span text:style-name="T41">div</text:span><text:span text:style-name="T45">&gt;</text:span></text:p>
      <text:p text:style-name="P64">            <text:span text:style-name="T45">&lt;</text:span><text:span text:style-name="T41">div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onClick</text:span><text:span text:style-name="T47">=</text:span><text:span text:style-name="T41">{</text:span><text:span text:style-name="T47">() </text:span><text:span text:style-name="T41">=&gt;</text:span><text:span text:style-name="T47"> </text:span><text:span text:style-name="T43">setVal</text:span><text:span text:style-name="T47">(</text:span><text:span text:style-name="T39">""</text:span><text:span text:style-name="T47">)</text:span><text:span text:style-name="T41">}</text:span><text:span text:style-name="T45">&gt;</text:span><text:span text:style-name="T44">C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0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0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onClick</text:span><text:span text:style-name="T47">=</text:span><text:span text:style-name="T41">{</text:span><text:span text:style-name="T47">() </text:span><text:span text:style-name="T41">=&gt;</text:span><text:span text:style-name="T47"> {</text:span></text:p>
      <text:p text:style-name="P64"><text:span text:style-name="T46">                    </text:span><text:span text:style-name="T32">try</text:span><text:span text:style-name="T47"> {</text:span></text:p>
      <text:p text:style-name="P64"><text:span text:style-name="T46">                        </text:span><text:span text:style-name="T41">const</text:span><text:span text:style-name="T47"> </text:span><text:span text:style-name="T54">result</text:span><text:span text:style-name="T47"> = </text:span><text:span text:style-name="T41">new</text:span><text:span text:style-name="T47"> </text:span><text:span text:style-name="T49">Function</text:span><text:span text:style-name="T47">(</text:span><text:span text:style-name="T39">'return '</text:span><text:span text:style-name="T47"> + </text:span><text:span text:style-name="T54">val</text:span><text:span text:style-name="T47">)();</text:span></text:p>
      <text:p text:style-name="P64"><text:span text:style-name="T46">                        </text:span><text:span text:style-name="T43">setVal</text:span><text:span text:style-name="T47">(</text:span><text:span text:style-name="T54">result</text:span><text:span text:style-name="T47">.</text:span><text:span text:style-name="T43">toString</text:span><text:span text:style-name="T47">());</text:span></text:p>
      <text:p text:style-name="P64"><text:span text:style-name="T46">                    </text:span><text:span text:style-name="T47">} </text:span><text:span text:style-name="T32">catch</text:span><text:span text:style-name="T47"> (</text:span><text:span text:style-name="T36">error</text:span><text:span text:style-name="T47">) {</text:span></text:p>
      <text:p text:style-name="P64"><text:span text:style-name="T46">                        </text:span><text:span text:style-name="T43">setVal</text:span><text:span text:style-name="T47">(</text:span><text:span text:style-name="T39">"Error"</text:span><text:span text:style-name="T47">);</text:span></text:p>
      <text:p text:style-name="P66">                    <text:span text:style-name="T44">}</text:span></text:p>
      <text:p text:style-name="P64"><text:span text:style-name="T46">                </text:span><text:span text:style-name="T47">}</text:span><text:span text:style-name="T41">}</text:span><text:span text:style-name="T45">&gt;</text:span><text:span text:style-name="T44">=</text:span><text:span text:style-name="T45">&lt;/</text:span><text:span text:style-name="T41">button</text:span><text:span text:style-name="T45">&gt;</text:span></text:p>
      <text:p text:style-name="P64">                <text:span text:style-name="T45">&lt;</text:span><text:span text:style-name="T41">button</text:span><text:span text:style-name="T44"> </text:span><text:span text:style-name="T36">className</text:span><text:span text:style-name="T47">=</text:span><text:span text:style-name="T39">'button'</text:span><text:span text:style-name="T44"> </text:span><text:span text:style-name="T36">value</text:span><text:span text:style-name="T47">=</text:span><text:span text:style-name="T39">"/"</text:span><text:span text:style-name="T44"> </text:span><text:span text:style-name="T36">onClick</text:span><text:span text:style-name="T47">=</text:span><text:span text:style-name="T41">{</text:span><text:span text:style-name="T47">(</text:span><text:span text:style-name="T36">e</text:span><text:span text:style-name="T47">) </text:span><text:span text:style-name="T41">=&gt;</text:span><text:span text:style-name="T47"> </text:span><text:span text:style-name="T43">setVal</text:span><text:span text:style-name="T47">(</text:span><text:span text:style-name="T54">val</text:span><text:span text:style-name="T47"> + </text:span><text:span text:style-name="T36">e</text:span><text:span text:style-name="T47">.</text:span><text:span text:style-name="T36">target</text:span><text:span text:style-name="T47">.</text:span><text:span text:style-name="T36">value</text:span><text:span text:style-name="T47">)</text:span><text:span text:style-name="T41">}</text:span><text:span text:style-name="T45">&gt;</text:span><text:span text:style-name="T44">/</text:span><text:span text:style-name="T45">&lt;/</text:span><text:span text:style-name="T41">button</text:span><text:span text:style-name="T45">&gt;</text:span></text:p>
      <text:p text:style-name="P64">            <text:span text:style-name="T45">&lt;/</text:span><text:span text:style-name="T41">div</text:span><text:span text:style-name="T45">&gt;</text:span></text:p>
      <text:p text:style-name="P64">        <text:span text:style-name="T45">&lt;/</text:span><text:span text:style-name="T41">div</text:span><text:span text:style-name="T45">&gt;</text:span></text:p>
      <text:p text:style-name="P64">    <text:span text:style-name="T44">);</text:span></text:p>
      <text:p text:style-name="P63">}</text:p>
      <text:p text:style-name="P65"/>
      <text:p text:style-name="P63"><text:span text:style-name="T30">export</text:span> <text:span text:style-name="T30">default</text:span> <text:span text:style-name="T42">Calculator</text:span>;</text:p>
      <text:p text:style-name="P63"/>
      <text:p text:style-name="P42"><text:span text:style-name="T33"/></text:p>
      <text:list xml:id="list34745716" text:continue-numbering="true" text:style-name="Outline">
        <text:list-item>
          <text:h text:style-name="P90" text:outline-level="1">OUTPUT:</text:h>
        </text:list-item>
      </text:list>
      <text:p text:style-name="P3"/>
      <text:p text:style-name="P28"/>
      <text:p text:style-name="P28"><draw:frame draw:style-name="fr1" draw:name="graphics1" text:anchor-type="paragraph" svg:width="6.6665in" svg:height="2.1283in" draw:z-index="4"><draw:image xlink:href="Pictures/10000201000003A2000001290E524410.png" xlink:type="simple" xlink:show="embed" xlink:actuate="onLoad"/></draw:frame></text:p>
      <text:p text:style-name="P28"/>
      <text:p text:style-name="P3"/>
      <text:p text:style-name="P3"/>
      <text:p text:style-name="P3"/>
      <text:p text:style-name="P3"/>
      <text:p text:style-name="P7"><draw:frame draw:style-name="fr1" draw:name="graphics3" text:anchor-type="paragraph" svg:width="6.6665in" svg:height="2.1283in" draw:z-index="2"><draw:image xlink:href="Pictures/10000201000003A2000001290E524410.png" xlink:type="simple" xlink:show="embed" xlink:actuate="onLoad"/></draw:frame><draw:frame draw:style-name="fr1" draw:name="graphics4" text:anchor-type="paragraph" svg:width="6.6665in" svg:height="2.1508in" draw:z-index="3"><draw:image xlink:href="Pictures/10000201000003C1000001368DB766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 MT" fo:font-size="11pt" fo:language="en" fo:country="US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0693in" fo:margin-right="0in" fo:margin-top="0.0555in" fo:margin-bottom="0in" fo:text-indent="0in" style:auto-text-indent="false"/>
      <style:text-properties style:font-name="Arial1" fo:font-size="15pt" fo:language="en" fo:country="US" fo:font-weight="bold" style:font-name-asian="Arial2" style:font-size-asian="15pt" style:language-asian="en" style:country-asian="US" style:font-weight-asian="bold" style:font-name-complex="Arial2" style:font-size-complex="15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0693in" fo:margin-right="0in" fo:text-indent="0in" style:auto-text-indent="false"/>
      <style:text-properties style:font-name="Arial1" fo:font-size="14pt" fo:language="en" fo:country="US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0618in" fo:margin-right="0in" fo:margin-top="0.0693in" fo:margin-bottom="0in" fo:text-indent="0in" style:auto-text-indent="false"/>
      <style:text-properties style:font-name="Arial1" fo:language="en" fo:country="US" style:font-name-asian="Arial2" style:language-asian="en" style:country-asian="US" style:font-name-complex="Arial2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445in" fo:margin-bottom="0.1945in" fo:margin-left="0.9307in" fo:margin-right="0.9028in" style:writing-mode="lr-tb" style:layout-grid-color="#c0c0c0" style:layout-grid-lines="25047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.0417in" fo:margin-bottom="0.1945in" fo:margin-left="0.9307in" fo:margin-right="0.9028in" style:writing-mode="lr-tb" style:layout-grid-color="#c0c0c0" style:layout-grid-lines="248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T Lab 17</dc:title>
    <meta:creation-date>2024-12-08T08:19:48</meta:creation-date>
    <dc:date>2024-12-08T14:50:31.46</dc:date>
    <meta:editing-duration>P0D</meta:editing-duration>
    <meta:generator>OpenOffice/4.1.5$Win32 OpenOffice.org_project/415m1$Build-9789</meta:generator>
    <meta:document-statistic meta:table-count="1" meta:image-count="3" meta:object-count="0" meta:page-count="5" meta:paragraph-count="119" meta:word-count="336" meta:character-count="37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